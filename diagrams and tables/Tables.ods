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2"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ce12"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ce130"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ce130"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ce130"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ce12"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4"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4"/>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cell table:number-columns-repeated="2"/>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Sometimes they are also mostly caused by the robot thinking it has departed, but it hasn’t, or by retriggering the same intersection it’s at accidentally.</text:p>
          </table:table-cell>
          <table:table-cell table:number-columns-repeated="2"/>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ood locs:</text:p>
          </table:table-cell>
          <table:table-cell table:formula="of:=SUM([.F:.F])" office:value-type="float" office:value="2" calcext:value-type="float">
            <text:p>2</text:p>
          </table:table-cell>
          <table:table-cell/>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bad locs:</text:p>
          </table:table-cell>
          <table:table-cell table:formula="of:=SUM([.G:.G])" office:value-type="float" office:value="26" calcext:value-type="float">
            <text:p>26</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total locs:</text:p>
          </table:table-cell>
          <table:table-cell table:formula="of:=SUM([.N5:.N6])" office:value-type="float" office:value="28" calcext:value-type="float">
            <text:p>28</text:p>
          </table:table-cell>
          <table:table-cell/>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orrect bel</text:p>
          </table:table-cell>
          <table:table-cell table:formula="of:=SUM([.H:.H])" office:value-type="float" office:value="64" calcext:value-type="float">
            <text:p>64</text:p>
          </table:table-cell>
          <table:table-cell/>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wrong bel</text:p>
          </table:table-cell>
          <table:table-cell table:formula="of:=SUM([.I:.I])" office:value-type="float" office:value="135" calcext:value-type="float">
            <text:p>135</text:p>
          </table:table-cell>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bels:</text:p>
          </table:table-cell>
          <table:table-cell table:formula="of:=[.N9]+[.N10]" office:value-type="float" office:value="199" calcext:value-type="float">
            <text:p>199</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orrect hyps:</text:p>
          </table:table-cell>
          <table:table-cell table:formula="of:=SUM([.J:.J])" office:value-type="float" office:value="61" calcext:value-type="float">
            <text:p>61</text:p>
          </table:table-cell>
          <table:table-cell/>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wrong hyps:</text:p>
          </table:table-cell>
          <table:table-cell table:formula="of:=SUM([.K:.K])" office:value-type="float" office:value="103" calcext:value-type="float">
            <text:p>103</text:p>
          </table:table-cell>
          <table:table-cell/>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hyps:</text:p>
          </table:table-cell>
          <table:table-cell table:formula="of:=[.N13]+[.N14]" office:value-type="float" office:value="164" calcext:value-type="float">
            <text:p>164</text:p>
          </table:table-cell>
          <table:table-cell/>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good grad:</text:p>
          </table:table-cell>
          <table:table-cell table:formula="of:=[.N5]/[.N13]" office:value-type="float" office:value="0.0327868852459016" calcext:value-type="float">
            <text:p>0.0327868852459016</text:p>
          </table:table-cell>
          <table:table-cell office:value-type="string" calcext:value-type="string">
            <text:p>which means that recovery nearly never happened, and if it did, it was more likely to be accidental rather than by promoting a correct hyp.</text:p>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ad grad:</text:p>
          </table:table-cell>
          <table:table-cell table:formula="of:=[.N6]/[.N14]" office:value-type="float" office:value="0.252427184466019" calcext:value-type="float">
            <text:p>0.252427184466019</text:p>
          </table:table-cell>
          <table:table-cell office:value-type="string" calcext:value-type="string">
            <text:p>which means that 0.75 of wrong bels got pruned out</text:p>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2"/>
          <table:table-cell office:value-type="string" calcext:value-type="string">
            <text:p>a few wrong turns and turn-arounds</text:p>
          </table:table-cell>
          <table:table-cell table:number-columns-repeated="2"/>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many misfires</text:p>
          </table:table-cell>
          <table:table-cell table:number-columns-repeated="2"/>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2"/>
          <table:table-cell office:value-type="string" calcext:value-type="string">
            <text:p>no missed junctions.</text:p>
          </table:table-cell>
          <table:table-cell table:number-columns-repeated="2"/>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5"/>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H</text:p>
          </table:table-cell>
          <table:table-cell office:value-type="string" calcext:value-type="string">
            <text:p>C</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C</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C</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text:p>
          </table:table-cell>
          <table:table-cell office:value-type="string" calcext:value-type="string">
            <text:p>[B]</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A</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B</text:p>
          </table:table-cell>
          <table:table-cell office:value-type="string" calcext:value-type="string">
            <text:p>H</text:p>
          </table:table-cell>
          <table:table-cell office:value-type="string" calcext:value-type="string">
            <text:p>[]</text:p>
          </table:table-cell>
          <table:table-cell office:value-type="string" calcext:value-type="string">
            <text:p>[A]</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B</text:p>
          </table:table-cell>
          <table:table-cell office:value-type="string" calcext:value-type="string">
            <text:p>[B]</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A</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5"/>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D</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1">
          <table:table-cell office:value-type="string" calcext:value-type="string">
            <text:p>C</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6"/>
        </table:table-row>
        <table:table-row table:style-name="ro1" table:number-rows-repeated="1048362">
          <table:table-cell table:number-columns-repeated="15"/>
        </table:table-row>
        <table:table-row table:style-name="ro1">
          <table:table-cell table:number-columns-repeated="15"/>
        </table:table-row>
      </table:table>
      <table:table table:name="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5">00/00/0000</text:date>, <text:time style:data-style-name="N2" text:time-value="23:40:04.17542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5T01:56:20.415944700</dc:date>
    <meta:editing-duration>PT17H27M45S</meta:editing-duration>
    <meta:editing-cycles>229</meta:editing-cycles>
    <meta:generator>LibreOffice/25.8.6.2$Windows_X86_64 LibreOffice_project/b4b39682cd9868fa725bc664aff94278d315bd04</meta:generator>
    <meta:print-date>2026-05-21T20:40:57.172138200</meta:print-date>
    <meta:document-statistic meta:table-count="7" meta:cell-count="3827" meta:object-count="0"/>
  </office:meta>
</office:document-meta>
</file>